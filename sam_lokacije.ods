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serska cesta 1 - Zg. Jarše, Radomlje</text:p>
          </table:table-cell>
          <table:table-cell office:value-type="float" office:value="46.162285" calcext:value-type="float">
            <text:p>46.162285</text:p>
          </table:table-cell>
          <table:table-cell office:value-type="float" office:value="14.593707" calcext:value-type="float">
            <text:p>14.593707</text:p>
          </table:table-cell>
        </table:table-row>
        <table:table-row table:style-name="ro1">
          <table:table-cell office:value-type="string" calcext:value-type="string">
            <text:p>Nasipi 6 <text:s/>a, Trbovlje</text:p>
          </table:table-cell>
          <table:table-cell office:value-type="float" office:value="46.139943" calcext:value-type="float">
            <text:p>46.139943</text:p>
          </table:table-cell>
          <table:table-cell office:value-type="float" office:value="15.036575" calcext:value-type="float">
            <text:p>15.036575</text:p>
          </table:table-cell>
        </table:table-row>
        <table:table-row table:style-name="ro1">
          <table:table-cell office:value-type="string" calcext:value-type="string">
            <text:p>Latkova vas 84, Prebold</text:p>
          </table:table-cell>
          <table:table-cell office:value-type="float" office:value="46.253616" calcext:value-type="float">
            <text:p>46.253616</text:p>
          </table:table-cell>
          <table:table-cell office:value-type="float" office:value="15.097108" calcext:value-type="float">
            <text:p>15.097108</text:p>
          </table:table-cell>
        </table:table-row>
        <table:table-row table:style-name="ro1">
          <table:table-cell office:value-type="string" calcext:value-type="string">
            <text:p>Lesarska cesta 2, Nazarje</text:p>
          </table:table-cell>
          <table:table-cell office:value-type="float" office:value="46.31933" calcext:value-type="float">
            <text:p>46.31933</text:p>
          </table:table-cell>
          <table:table-cell office:value-type="float" office:value="14.949486" calcext:value-type="float">
            <text:p>14.949486</text:p>
          </table:table-cell>
        </table:table-row>
        <table:table-row table:style-name="ro1">
          <table:table-cell office:value-type="string" calcext:value-type="string">
            <text:p>Medvedova ulica 15c, Kamnik</text:p>
          </table:table-cell>
          <table:table-cell office:value-type="float" office:value="46.228859" calcext:value-type="float">
            <text:p>46.228859</text:p>
          </table:table-cell>
          <table:table-cell office:value-type="float" office:value="14.609904" calcext:value-type="float">
            <text:p>14.609904</text:p>
          </table:table-cell>
        </table:table-row>
        <table:table-row table:style-name="ro1">
          <table:table-cell office:value-type="string" calcext:value-type="string">
            <text:p>Gosposvetska cesta 12, Ljubljana</text:p>
          </table:table-cell>
          <table:table-cell office:value-type="float" office:value="46.0557628" calcext:value-type="float">
            <text:p>46.0557628</text:p>
          </table:table-cell>
          <table:table-cell office:value-type="float" office:value="14.5002135" calcext:value-type="float">
            <text:p>14.5002135</text:p>
          </table:table-cell>
        </table:table-row>
        <table:table-row table:style-name="ro1">
          <table:table-cell office:value-type="string" calcext:value-type="string">
            <text:p>Hardek 44b, Ormož</text:p>
          </table:table-cell>
          <table:table-cell office:value-type="float" office:value="46.4099334" calcext:value-type="float">
            <text:p>46.4099334</text:p>
          </table:table-cell>
          <table:table-cell office:value-type="float" office:value="16.157438" calcext:value-type="float">
            <text:p>16.157438</text:p>
          </table:table-cell>
        </table:table-row>
        <table:table-row table:style-name="ro1">
          <table:table-cell office:value-type="string" calcext:value-type="string">
            <text:p>Gorenjska cesta 11, Mengeš</text:p>
          </table:table-cell>
          <table:table-cell office:value-type="float" office:value="46.1749562" calcext:value-type="float">
            <text:p>46.1749562</text:p>
          </table:table-cell>
          <table:table-cell office:value-type="float" office:value="14.5640766" calcext:value-type="float">
            <text:p>14.5640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8:32:19.304415341</meta:creation-date>
    <dc:date>2026-04-04T18:45:30.062238549</dc:date>
    <meta:editing-duration>PT2M26S</meta:editing-duration>
    <meta:editing-cycles>1</meta:editing-cycles>
    <meta:generator>LibreOffice/25.8.5.2$Linux_X86_64 LibreOffice_project/580$Build-2</meta:generator>
    <meta:document-statistic meta:table-count="1" meta:cell-count="24" meta:object-count="0"/>
  </office:meta>
</office:document-meta>
</file>