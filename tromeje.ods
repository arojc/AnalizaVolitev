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537061.86" calcext:value-type="float">
            <text:p>537061.86</text:p>
          </table:table-cell>
          <table:table-cell office:value-type="float" office:value="103475.06" calcext:value-type="float">
            <text:p>103475.06</text:p>
          </table:table-cell>
        </table:table-row>
        <table:table-row table:style-name="ro1">
          <table:table-cell office:value-type="float" office:value="464304.37" calcext:value-type="float">
            <text:p>464304.37</text:p>
          </table:table-cell>
          <table:table-cell office:value-type="float" office:value="114823.15" calcext:value-type="float">
            <text:p>114823.15</text:p>
          </table:table-cell>
        </table:table-row>
        <table:table-row table:style-name="ro1">
          <table:table-cell office:value-type="float" office:value="492144.53" calcext:value-type="float">
            <text:p>492144.53</text:p>
          </table:table-cell>
          <table:table-cell office:value-type="float" office:value="118425.52" calcext:value-type="float">
            <text:p>118425.52</text:p>
          </table:table-cell>
        </table:table-row>
        <table:table-row table:style-name="ro1">
          <table:table-cell office:value-type="float" office:value="432009.54" calcext:value-type="float">
            <text:p>432009.54</text:p>
          </table:table-cell>
          <table:table-cell office:value-type="float" office:value="82449.34" calcext:value-type="float">
            <text:p>82449.34</text:p>
          </table:table-cell>
        </table:table-row>
        <table:table-row table:style-name="ro1">
          <table:table-cell office:value-type="float" office:value="492955.08" calcext:value-type="float">
            <text:p>492955.08</text:p>
          </table:table-cell>
          <table:table-cell office:value-type="float" office:value="118678.69" calcext:value-type="float">
            <text:p>118678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00:13:38.900113884</meta:creation-date>
    <dc:date>2026-04-11T00:17:07.256314403</dc:date>
    <meta:editing-duration>PT3M29S</meta:editing-duration>
    <meta:editing-cycles>1</meta:editing-cycles>
    <meta:document-statistic meta:table-count="1" meta:cell-count="10" meta:object-count="0"/>
    <meta:generator>LibreOffice/25.8.5.2$Linux_X86_64 LibreOffice_project/580$Build-2</meta:generator>
  </office:meta>
</office:document-meta>
</file>